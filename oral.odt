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4.292cm"/>
    </style:style>
    <style:style style:name="Tableau1.B" style:family="table-column">
      <style:table-column-properties style:column-width="12.709cm"/>
    </style:style>
    <style:style style:name="Tableau1.A1" style:family="table-cell">
      <style:table-cell-properties style:vertical-align="middle" fo:padding="0.049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Introduction</text:span></text:p>
      <text:p text:style-name="Text_20_body">Pour ma veille technologique, j'ai choisi un sujet qui m'a vraiment intéressé : l'utilisation de l'intelligence artificielle et du Machine Learning en Formule 1.</text:p>
      <text:p text:style-name="Text_20_body"><text:span text:style-name="Strong_20_Emphasis">Contexte</text:span></text:p>
      <text:p text:style-name="Text_20_body">La F1 est aujourd'hui l'un des sports les plus technologiques au monde. Chaque voiture génère jusqu'à 300 gigaoctets de données par course, via plus de 1 500 capteurs embarqués. Ce volume est impossible à exploiter à la main — c'est là que l'IA entre en jeu.</text:p>
      <text:p text:style-name="Text_20_body"><text:span text:style-name="Strong_20_Emphasis">Ce que fait concrètement l'IA</text:span></text:p>
      <text:p text:style-name="Text_20_body">Premier point : la prédiction des arrêts aux stands. L'algorithme analyse en temps réel la dégradation des pneus, la météo, la position des adversaires, et calcule le moment optimal pour rentrer. Se tromper d'un tour peut faire perdre une place entière.</text:p>
      <text:p text:style-name="Text_20_body">Deuxième point : la simulation de course. Avant le départ, les équipes simulent des milliers de scénarios pour choisir la meilleure stratégie de pneus. Ce que l'humain ferait en plusieurs heures, l'IA le fait en quelques secondes.</text:p>
      <text:p text:style-name="Text_20_body">Troisième point : l'analyse des pneus en temps réel. Des modèles ML prédisent combien de tours restent avant une perte de performance critique, et alertent l'ingénieur immédiatement.</text:p>
      <text:p text:style-name="Text_20_body"><text:span text:style-name="Strong_20_Emphasis">Les acteurs</text:span></text:p>
      <text:p text:style-name="Text_20_body">Des écuries comme Mercedes, Ferrari ou Red Bull travaillent avec Oracle, AWS et Microsoft pour leurs modèles prédictifs. Williams Racing utilise même le modèle Claude d'Anthropic pour influencer directement sa stratégie de course. <text:a xlink:type="simple" xlink:href="https://www.lefute.fr/2026/05/04/cette-incroyable-evolution-de-la-formule-1-lia-revolutionne-les-paddocks" office:target-frame-name="_blank" xlink:show="new" text:style-name="Internet_20_link" text:visited-style-name="Visited_20_Internet_20_Link">Le Fute</text:a></text:p>
      <text:p text:style-name="Text_20_body"><text:span text:style-name="Strong_20_Emphasis">Conclusion</text:span></text:p>
      <text:p text:style-name="Text_20_body">Ce sujet me parle directement parce que les concepts utilisés — prédiction, simulation, analyse de données — sont exactement ceux qu'on retrouve dans les applications métier que je développe en SLAM.</text:p>
      <text:p text:style-name="Horizontal_20_Line"/>
      <text:h text:style-name="Heading_20_3" text:outline-level="3"/>
      <text:p text:style-name="Text_20_body"/>
      <text:p text:style-name="Text_20_body"/>
      <text:p text:style-name="Text_20_body"/>
      <text:p text:style-name="Text_20_body"/>
      <text:p text:style-name="Text_20_body"/>
      <text:h text:style-name="Heading_20_3" text:outline-level="3"><text:soft-page-break/></text:h>
      <text:h text:style-name="Heading_20_3" text:outline-level="3"/>
      <text:h text:style-name="Heading_20_3" text:outline-level="3">Mémo anti-questions</text:h>
      <table:table table:name="Tableau1" table:style-name="Tableau1">
        <table:table-column table:style-name="Tableau1.A"/>
        <table:table-column table:style-name="Tableau1.B"/>
        <table:table-header-rows>
          <table:table-row>
            <table:table-cell table:style-name="Tableau1.A1" office:value-type="string">
              <text:p text:style-name="Table_20_Heading">Question possible</text:p>
            </table:table-cell>
            <table:table-cell table:style-name="Tableau1.A1" office:value-type="string">
              <text:p text:style-name="Table_20_Heading">Réponse courte</text:p>
            </table:table-cell>
          </table:table-row>
        </table:table-header-rows>
        <table:table-row>
          <table:table-cell table:style-name="Tableau1.A1" office:value-type="string">
            <text:p text:style-name="Table_20_Contents"><text:span text:style-name="Emphasis">C'est quoi le Machine Learning ?</text:span></text:p>
          </table:table-cell>
          <table:table-cell table:style-name="Tableau1.A1" office:value-type="string">
            <text:p text:style-name="Table_20_Contents">C'est une branche de l'IA où un algorithme apprend à partir de données sans être programmé règle par règle. Plus il voit de données, plus il s'améliore.</text:p>
          </table:table-cell>
        </table:table-row>
        <table:table-row>
          <table:table-cell table:style-name="Tableau1.A1" office:value-type="string">
            <text:p text:style-name="Table_20_Contents"><text:span text:style-name="Emphasis">Comment l'IA sait quand changer les pneus ?</text:span></text:p>
          </table:table-cell>
          <table:table-cell table:style-name="Tableau1.A1" office:value-type="string">
            <text:p text:style-name="Table_20_Contents">Elle croise en temps réel : dégradation des gommes, météo, position des concurrents, et l'historique de milliers de courses pour trouver le meilleur moment.</text:p>
          </table:table-cell>
        </table:table-row>
        <table:table-row>
          <table:table-cell table:style-name="Tableau1.A1" office:value-type="string">
            <text:p text:style-name="Table_20_Contents"><text:span text:style-name="Emphasis">C'est quoi une simulation Monte Carlo ?</text:span></text:p>
          </table:table-cell>
          <table:table-cell table:style-name="Tableau1.A1" office:value-type="string">
            <text:p text:style-name="Table_20_Contents">On lance des millions de variantes d'une même course avec des paramètres légèrement différents. Ça permet de voir quelle stratégie gagne le plus souvent.</text:p>
          </table:table-cell>
        </table:table-row>
        <table:table-row>
          <table:table-cell table:style-name="Tableau1.A1" office:value-type="string">
            <text:p text:style-name="Table_20_Contents"><text:span text:style-name="Emphasis">Quel est le risque de l'IA en course ?</text:span></text:p>
          </table:table-cell>
          <table:table-cell table:style-name="Tableau1.A1" office:value-type="string">
            <text:p text:style-name="Table_20_Contents">L'IA ne gère pas l'imprévisible : un accident, une voiture de sécurité soudaine, une décision humaine inattendue. C'est pour ça que les ingénieurs gardent le dernier mot.</text:p>
          </table:table-cell>
        </table:table-row>
        <table:table-row>
          <table:table-cell table:style-name="Tableau1.A1" office:value-type="string">
            <text:p text:style-name="Table_20_Contents"><text:span text:style-name="Emphasis">Depuis quand la F1 utilise l'IA ?</text:span></text:p>
          </table:table-cell>
          <table:table-cell table:style-name="Tableau1.A1" office:value-type="string">
            <text:p text:style-name="Table_20_Contents">Le Machine Learning a fait son entrée en 2018 avec le partenariat F1/AWS. Les modèles génératifs et agentiques sont arrivés sur les deux dernières saisons.</text:p>
          </table:table-cell>
        </table:table-row>
        <table:table-row>
          <table:table-cell table:style-name="Tableau1.A1" office:value-type="string">
            <text:p text:style-name="Table_20_Contents"><text:span text:style-name="Emphasis">C'est quoi le lien avec ton BTS ?</text:span></text:p>
          </table:table-cell>
          <table:table-cell table:style-name="Tableau1.A1" office:value-type="string">
            <text:p text:style-name="Table_20_Contents">En SLAM, on développe des applications qui traitent des données, font des requêtes SQL, automatisent des tâches. C'est la même logique, à une échelle différent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4T18:25:19.528000000</meta:creation-date>
    <dc:date>2026-05-24T18:26:02.117000000</dc:date>
    <meta:editing-duration>PT43S</meta:editing-duration>
    <meta:editing-cycles>1</meta:editing-cycles>
    <meta:document-statistic meta:table-count="1" meta:image-count="0" meta:object-count="0" meta:page-count="2" meta:paragraph-count="27" meta:word-count="451" meta:character-count="2806" meta:non-whitespace-character-count="2379"/>
    <meta:generator>LibreOffice/7.6.1.2$Windows_X86_64 LibreOffice_project/f5defcebd022c5bc36bbb79be232cb6926d8f674</meta:generator>
  </office:meta>
</office:document-meta>
</file>